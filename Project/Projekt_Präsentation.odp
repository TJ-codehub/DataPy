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7" draw:name="Titel 1" svg:x="1.31206in" svg:y="1.24871in" svg:width="10.70922in" svg:height="2.61111in" presentation:class="title" presentation:placeholder="false">
          <draw:text-box>
            <text:p text:style-name="a386" text:class-names="" text:cond-style-name=""><text:span text:style-name="a381" text:class-names="">NYC<text:s text:c="1"/></text:span><text:span text:style-name="a382" text:class-names="">Motor</text:span><text:span text:style-name="a383" text:class-names=""><text:s text:c="1"/>Vehicle<text:s text:c="1"/></text:span><text:span text:style-name="a384" text:class-names="">Collisions</text:span><text:span text:style-name="a385" text:class-names=""/></text:p>
          </draw:text-box>
          <svg:title/>
          <svg:desc/>
        </draw:frame>
        <draw:frame draw:id="id64" presentation:style-name="a411" draw:name="Untertitel 2" svg:x="1.66667in" svg:y="3.93924in" svg:width="10in" svg:height="2.98629in" presentation:class="subtitle" presentation:placeholder="false">
          <draw:text-box>
            <text:p text:style-name="a389" text:class-names="" text:cond-style-name=""><text:span text:style-name="a388" text:class-names=""/></text:p>
            <text:p text:style-name="a403" text:class-names="" text:cond-style-name=""><text:span text:style-name="a390" text:class-names="">Analyse</text:span><text:span text:style-name="a391" text:class-names=""><text:s text:c="1"/></text:span><text:span text:style-name="a392" text:class-names="">von</text:span><text:span text:style-name="a393" text:class-names=""><text:s text:c="1"/></text:span><text:span text:style-name="a394" text:class-names="">Unfall-Daten</text:span><text:span text:style-name="a395" text:class-names=""><text:s text:c="1"/></text:span><text:span text:style-name="a396" text:class-names="">in</text:span><text:span text:style-name="a397" text:class-names=""><text:s text:c="1"/></text:span><text:span text:style-name="a398" text:class-names="">New</text:span><text:span text:style-name="a399" text:class-names=""><text:s text:c="1"/></text:span><text:span text:style-name="a400" text:class-names="">York</text:span><text:span text:style-name="a401" text:class-names=""><text:s text:c="1"/></text:span><text:span text:style-name="a402" text:class-names="">City</text:span></text:p>
            <text:p text:style-name="a405" text:class-names="" text:cond-style-name=""><text:span text:style-name="a404" text:class-names=""/></text:p>
            <text:p text:style-name="a407" text:class-names="" text:cond-style-name=""><text:span text:style-name="a406" text:class-names=""/></text:p>
            <text:p text:style-name="a410" text:class-names="" text:cond-style-name=""><text:span text:style-name="a408" text:class-names="">DataPy // Prof. Bießmann &amp; Prof. Ipek-Ugay</text:span><text:span text:style-name="a409" text:class-names=""/></text:p>
          </draw:text-box>
          <svg:title/>
          <svg:desc/>
        </draw:frame>
      </draw:page>
      <draw:page draw:name="Slide2" draw:style-name="a412" draw:master-page-name="Master1-Layout2-obj-Titel-und-Inhalt" presentation:presentation-page-layout-name="Master1-PPL2" draw:id="Slide-257">
        <draw:frame draw:id="id65" presentation:style-name="a416" draw:name="Titel 1" svg:x="0.91667in" svg:y="0.39931in" svg:width="11.5in" svg:height="1.44965in" presentation:class="title" presentation:placeholder="false">
          <draw:text-box>
            <text:p text:style-name="a415" text:class-names="" text:cond-style-name=""><text:span text:style-name="a413" text:class-names="">Datensatz:</text:span><text:span text:style-name="a414" text:class-names=""/></text:p>
          </draw:text-box>
          <svg:title/>
          <svg:desc/>
        </draw:frame>
        <draw:frame draw:id="id66" presentation:style-name="a451" draw:name="Inhaltsplatzhalter 2" svg:x="0.91667in" svg:y="1.99653in" svg:width="11.5in" svg:height="4.75868in" presentation:class="outline" presentation:placeholder="false">
          <draw:text-box>
            <text:list text:style-name="a420">
              <text:list-item>
                <text:p text:style-name="a419" text:class-names="" text:cond-style-name=""><text:span text:style-name="a417" text:class-names="">Herkunft:</text:span><text:span text:style-name="a418" text:class-names=""><text:s text:c="1"/>Offizielles US-Behördenportal (Data.gov)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<text:tab/><text:tab/>[https://catalog.data.gov/dataset/motor-vehicle-collisions-crashes]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/></text:p>
              </text:list-item>
            </text:list>
            <text:list text:style-name="a430">
              <text:list-item>
                <text:p text:style-name="a429" text:class-names="" text:cond-style-name=""><text:span text:style-name="a427" text:class-names="">Art der Daten:</text:span><text:span text:style-name="a428" text:class-names=""><text:s text:c="1"/>Alle polizeilich erfassten Verkehrsunfälle in New York City (Zeitraum 2012 bis heute)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4" text:class-names="">Zentrale Merkmale im Datensatz:</text:span><text:span text:style-name="a435" text:class-names=""/></text:p>
              </text:list-item>
            </text:list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8" text:class-names="">Zeit &amp; Ort:</text:span><text:span text:style-name="a439" text:class-names=""><text:s text:c="1"/>Datum, Uhrzeit, Stadtteil (Borough), exakte GPS-Koordinaten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2" text:class-names="">Kontext:</text:span><text:span text:style-name="a443" text:class-names=""><text:s text:c="1"/>Unfallursachen (z. B. Ablenkung), beteiligte Fahrzeugtypen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6" text:class-names="">Auswirkungen:</text:span><text:span text:style-name="a447" text:class-names=""><text:s text:c="1"/>Anzahl der verletzten oder getöteten Personen</text:span><text:span text:style-name="a44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452" draw:master-page-name="Master1-Layout2-obj-Titel-und-Inhalt" presentation:presentation-page-layout-name="Master1-PPL2" draw:id="Slide-258">
        <draw:frame draw:id="id67" presentation:style-name="a456" draw:name="Titel 1" svg:x="0.91667in" svg:y="0.39931in" svg:width="11.5in" svg:height="1.44965in" presentation:class="title" presentation:placeholder="false">
          <draw:text-box>
            <text:p text:style-name="a455" text:class-names="" text:cond-style-name=""><text:span text:style-name="a453" text:class-names="">Probleme der Rohdaten:</text:span><text:span text:style-name="a454" text:class-names=""/></text:p>
          </draw:text-box>
          <svg:title/>
          <svg:desc/>
        </draw:frame>
        <draw:frame draw:id="id68" presentation:style-name="a493" draw:name="Inhaltsplatzhalter 2" svg:x="0.91667in" svg:y="1.99653in" svg:width="11.5in" svg:height="4.75868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7" text:class-names="">Falsche Formate:</text:span><text:span text:style-name="a458" text:class-names=""><text:s text:c="1"/>Datums- und Uhrzeitspalten waren als reiner Text hinterlegt. Viele Text Spalten als „Object“-Datentyp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  <text:list text:style-name="a469">
              <text:list-item>
                <text:p text:style-name="a468" text:class-names="" text:cond-style-name=""><text:span text:style-name="a464" text:class-names="">Große Lücken:</text:span><text:span text:style-name="a465" text:class-names=""><text:s text:c="1"/>Viele fehlende Werte (</text:span><text:span text:style-name="a466" text:class-names="">NaN</text:span><text:span text:style-name="a467" text:class-names="">) bei den GPS-Koordinaten und Stadtteilen.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3" text:class-names="">Fehlende Daten:</text:span><text:span text:style-name="a474" text:class-names=""><text:s text:c="1"/>Ungenaue oder nichtssagende Einträge wie<text:s text:c="1"/></text:span><text:span text:style-name="a475" text:class-names="">'UNSPECIFIED'</text:span><text:span text:style-name="a476" text:class-names=""><text:s text:c="1"/>oder<text:s text:c="1"/></text:span><text:span text:style-name="a477" text:class-names="">'UNKNOWN'</text:span><text:span text:style-name="a478" text:class-names=""><text:s text:c="1"/>bei den Unfallursachen.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4" text:class-names="">Schreibfehler:</text:span><text:span text:style-name="a485" text:class-names=""><text:s text:c="1"/>Doppelte Bezeichnungen bei Fahrzeugtypen (z. B. "TAXI" und<text:s text:c="1"/></text:span><text:span text:style-name="a486" text:class-names="">"Taxi"</text:span><text:span text:style-name="a487" text:class-names="">).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4" draw:style-name="a494" draw:master-page-name="Master1-Layout2-obj-Titel-und-Inhalt" presentation:presentation-page-layout-name="Master1-PPL2" draw:id="Slide-259">
        <draw:frame draw:id="id69" presentation:style-name="a498" draw:name="Titel 1" svg:x="0.91667in" svg:y="0.39931in" svg:width="11.5in" svg:height="1.44965in" presentation:class="title" presentation:placeholder="false">
          <draw:text-box>
            <text:p text:style-name="a497" text:class-names="" text:cond-style-name=""><text:span text:style-name="a495" text:class-names="">Data-Cleaning</text:span><text:span text:style-name="a496" text:class-names=""/></text:p>
          </draw:text-box>
          <svg:title/>
          <svg:desc/>
        </draw:frame>
        <draw:frame draw:id="id70" presentation:style-name="a540" draw:name="Inhaltsplatzhalter 2" svg:x="0.91667in" svg:y="1.99653in" svg:width="11.5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499" text:class-names="">Typ-Konvertierung:</text:span><text:span text:style-name="a500" text:class-names=""><text:s text:c="1"/>Umwandlung von<text:s text:c="1"/></text:span><text:span text:style-name="a501" text:class-names="">CRASH DATE</text:span><text:span text:style-name="a502" text:class-names=""><text:s text:c="1"/>in ein echtes, berechenbares Datumsformat (</text:span><text:span text:style-name="a503" text:class-names="">datetime64</text:span><text:span text:style-name="a504" text:class-names="">).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10" text:class-names="">Text-Bereinigung:</text:span><text:span text:style-name="a511" text:class-names=""><text:s text:c="1"/>Zusammenführung von falsch geschriebenen Fahrzeugtypen und Vereinheitlichung der Schreibweisen.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17" text:class-names="">GPS-Daten</text:span><text:span text:style-name="a518" text:class-names=""><text:s text:c="1"/></text:span><text:span text:style-name="a519" text:class-names="">prüfen:</text:span><text:span text:style-name="a520" text:class-names=""><text:s text:c="1"/></text:span><text:span text:style-name="a521" text:class-names="">Koordinaten</text:span><text:span text:style-name="a522" text:class-names=""><text:s text:c="1"/>die außerhalb von NYC liegen werden auf NaN gesetzt.</text:span><text:span text:style-name="a523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  <text:list text:style-name="a533">
              <text:list-item>
                <text:p text:style-name="a532" text:class-names="" text:cond-style-name=""><text:span text:style-name="a529" text:class-names="">Vereinheitlichung</text:span><text:span text:style-name="a530" text:class-names="">: Angaben wie<text:s text:c="1"/></text:span><text:span text:style-name="a531" text:class-names="">'UNSPECIFIED' oder 'UNKNOWN‘ und offensichtlich falsche Daten werden auf pandas.NA gesetzt.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5" draw:style-name="a541" draw:master-page-name="Master1-Layout2-obj-Titel-und-Inhalt" presentation:presentation-page-layout-name="Master1-PPL2" draw:id="Slide-260">
        <draw:frame draw:id="id71" presentation:style-name="a545" draw:name="Titel 1" svg:x="0.91667in" svg:y="0.39931in" svg:width="11.5in" svg:height="1.44965in" presentation:class="title" presentation:placeholder="false">
          <draw:text-box>
            <text:p text:style-name="a544" text:class-names="" text:cond-style-name=""><text:span text:style-name="a542" text:class-names="">Optimierung der Daten:</text:span><text:span text:style-name="a543" text:class-names=""/></text:p>
          </draw:text-box>
          <svg:title/>
          <svg:desc/>
        </draw:frame>
        <draw:frame draw:id="id72" presentation:style-name="a574" draw:name="Inhaltsplatzhalter 2" svg:x="0.91667in" svg:y="1.99653in" svg:width="11.5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6" text:class-names="">Neue Spalten:</text:span><text:span text:style-name="a547" text:class-names=""><text:s text:c="1"/>‚CRASH HOUR‘ und ‚WEEKDAY‘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  <text:list text:style-name="a559">
              <text:list-item>
                <text:p text:style-name="a558" text:class-names="" text:cond-style-name=""><text:span text:style-name="a553" text:class-names="">Typ-Vereinheitlichung:<text:s text:c="1"/></text:span><text:span text:style-name="a554" text:class-names="">Umwandlung aller Textspalten in den Pandas-Datentyp<text:s text:c="1"/></text:span><text:span text:style-name="a555" text:class-names="">string</text:span><text:span text:style-name="a556" text:class-names="">.</text:span><text:span text:style-name="a557" text:class-names=""/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63" text:class-names="">I</text:span><text:span text:style-name="a564" text:class-names="">mplizite Daten</text:span><text:span text:style-name="a565" text:class-names=""><text:s text:c="1"/></text:span><text:span text:style-name="a566" text:class-names="">einfügen:<text:s text:c="1"/></text:span><text:span text:style-name="a567" text:class-names="">Bei leeren 'NUMBER OF PEOPLE INJURED/KILLED‘ Zeilen wird 0 angenommen.</text:span><text:span text:style-name="a568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8" draw:style-name="a575" draw:master-page-name="Master1-Layout2-obj-Titel-und-Inhalt" presentation:presentation-page-layout-name="Master1-PPL2" draw:id="Slide-263">
        <draw:frame draw:id="id73" presentation:style-name="a579" draw:name="Titel 1" svg:x="0.91667in" svg:y="0.39931in" svg:width="11.5in" svg:height="1.44965in" presentation:class="title" presentation:placeholder="false">
          <draw:text-box>
            <text:p text:style-name="a578" text:class-names="" text:cond-style-name=""><text:span text:style-name="a576" text:class-names="">Wichtige Visualisierungen:</text:span><text:span text:style-name="a577" text:class-names=""/></text:p>
          </draw:text-box>
          <svg:title/>
          <svg:desc/>
        </draw:frame>
        <draw:frame draw:id="id74" presentation:style-name="a604" draw:name="Inhaltsplatzhalter 2" svg:x="0.91667in" svg:y="1.99653in" svg:width="11.5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0" text:class-names="">Hauptunfallursachen:</text:span><text:span text:style-name="a581" text:class-names=""/></text:p>
              </text:list-item>
            </text:list>
            <text:list text:style-name="a588">
              <text:list-item>
                <text:list text:style-name="a588">
                  <text:list-item>
                    <text:p text:style-name="a587" text:class-names="" text:cond-style-name=""><text:span text:style-name="a584" text:class-names="">Visuelle Darstellung der Top-20-Ursachen.<text:s text:c="1"/></text:span><text:span text:style-name="a585" text:class-names="">Ergebnis:</text:span><text:span text:style-name="a586" text:class-names=""><text:s text:c="1"/>"Driver Inattention/Distraction" (Ablenkung) ist mit weitem Abstand die häufigste Ursache.</text:span></text:p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p text:style-name="a590" text:class-names="" text:cond-style-name=""><text:span text:style-name="a589" text:class-names=""/></text:p>
                  </text:list-item>
                </text:list>
              </text:list-item>
            </text:list>
            <text:list text:style-name="a595">
              <text:list-item>
                <text:p text:style-name="a594" text:class-names="" text:cond-style-name=""><text:span text:style-name="a592" text:class-names="">Beteiligte Fahrzeuge:</text:span><text:span text:style-name="a593" text:class-names=""/></text:p>
              </text:list-item>
            </text:list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6" text:class-names="">SUVs und Sedans (Limousinen) dominieren die Unfallstatisti</text:span><text:span text:style-name="a597" text:class-names="">k.</text:span><text:span text:style-name="a598" text:class-names=""/></text:p>
                  </text:list-item>
                </text:list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6" draw:style-name="a605" draw:master-page-name="Master1-Layout2-obj-Titel-und-Inhalt" presentation:presentation-page-layout-name="Master1-PPL2" draw:id="Slide-261">
        <draw:frame draw:id="id75" presentation:style-name="a609" draw:name="Titel 1" svg:x="0.91667in" svg:y="0.39931in" svg:width="11.5in" svg:height="1.44965in" presentation:class="title" presentation:placeholder="false">
          <draw:text-box>
            <text:p text:style-name="a608" text:class-names="" text:cond-style-name=""><text:span text:style-name="a606" text:class-names="">Visualisierungen Erkenntnisse:</text:span><text:span text:style-name="a607" text:class-names=""/></text:p>
          </draw:text-box>
          <svg:title/>
          <svg:desc/>
        </draw:frame>
        <draw:frame draw:id="id76" presentation:style-name="a628" draw:name="Inhaltsplatzhalter 2" svg:x="0.91667in" svg:y="1.99653in" svg:width="11.5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Wochentag-Uhrzeit-Heatmap:</text:span></text:p>
              </text:list-item>
            </text:list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3" text:class-names="">Unter der Woche:</text:span><text:span text:style-name="a614" text:class-names=""><text:s text:c="1"/>Unfälle häufen sich in den klassischen Rush-Hours (morgens um 08:00 Uhr und nachmittags zwischen 16:00 und 17:00)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p text:style-name="a618" text:class-names="" text:cond-style-name=""><text:span text:style-name="a617" text:class-names=""/></text:p>
                  </text:list-item>
                </text:list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Der Saisonale Verlauf:</text:span></text:p>
              </text:list-item>
            </text:list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3" text:class-names="">Die Unfallkurve bleibt über das Jahr<text:s text:c="1"/></text:span><text:span text:style-name="a624" text:class-names="">hinweg relativ</text:span><text:span text:style-name="a625" text:class-names=""><text:s text:c="1"/>flach. Das Wetter (wie Winter oder Schnee) hat statistisch einen geringeren Einfluss auf die Unfallmenge als gedacht.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Rothan, Justus</meta:initial-creator>
    <dc:creator>Rothan, Justus</dc:creator>
    <meta:creation-date>2026-06-23T19:11:09Z</meta:creation-date>
    <dc:date>2026-06-23T20:55:56Z</dc:date>
    <meta:editing-cycles>3</meta:editing-cycles>
    <meta:editing-duration>PT0S</meta:editing-duration>
    <meta:document-statistic meta:paragraph-count="50" meta:word-count="385"/>
  </office:meta>
</office:document-meta>
</file>