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font-size="24pt" style:font-size-asian="24pt" style:font-size-complex="24pt"/>
    </style:style>
    <style:style style:name="P3" style:parent-style-name="Standard" style:family="paragraph">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list-style-name="LFO1" style:family="paragraph"/>
    <style:style style:name="T8" style:parent-style-name="Absatz-Standardschriftart" style:family="text">
      <style:text-properties fo:font-weight="bold" style:font-weight-asian="bold" style:font-weight-complex="bold"/>
    </style:style>
    <style:style style:name="P9" style:parent-style-name="Standard" style:list-style-name="LFO1" style:family="paragraph"/>
    <style:style style:name="T10" style:parent-style-name="Absatz-Standardschriftart" style:family="text">
      <style:text-properties fo:font-weight="bold" style:font-weight-asian="bold" style:font-weight-complex="bold"/>
    </style:style>
    <style:style style:name="P11" style:parent-style-name="Standard" style:list-style-name="LFO1" style:family="paragraph"/>
    <style:style style:name="T12" style:parent-style-name="Absatz-Standardschriftart" style:family="text">
      <style:text-properties fo:font-weight="bold" style:font-weight-asian="bold" style:font-weight-complex="bold"/>
    </style:style>
    <style:style style:name="T13" style:parent-style-name="Absatz-Standardschriftart" style:family="text">
      <style:text-properties fo:font-style="italic" style:font-style-asian="italic" style:font-style-complex="italic"/>
    </style:style>
    <style:style style:name="P14" style:parent-style-name="Standard" style:list-style-name="LFO1" style:family="paragraph"/>
    <style:style style:name="T15" style:parent-style-name="Absatz-Standardschriftart" style:family="text">
      <style:text-properties fo:font-weight="bold" style:font-weight-asian="bold" style:font-weight-complex="bold"/>
    </style:style>
    <style:style style:name="P16" style:parent-style-name="Standard" style:family="paragraph">
      <style:paragraph-properties fo:break-before="page"/>
      <style:text-properties fo:hyphenate="true"/>
    </style:style>
    <style:style style:name="T17" style:parent-style-name="Absatz-Standardschriftart" style:family="text">
      <style:text-properties fo:font-weight="bold" style:font-weight-asian="bold" style:font-weight-complex="bold"/>
    </style:style>
    <style:style style:name="T18" style:parent-style-name="Absatz-Standardschriftart" style:family="text">
      <style:text-properties fo:font-weight="bold" style:font-weight-asian="bold" style:font-weight-complex="bold"/>
    </style:style>
    <style:style style:name="T19" style:parent-style-name="Absatz-Standardschriftart" style:family="text">
      <style:text-properties fo:font-weight="bold" style:font-weight-asian="bold" style:font-weight-complex="bold"/>
    </style:style>
    <style:style style:name="P20" style:parent-style-name="Standard" style:list-style-name="LFO2" style:family="paragraph"/>
    <style:style style:name="P21" style:parent-style-name="Standard" style:list-style-name="LFO2" style:family="paragraph"/>
    <style:style style:name="P22" style:parent-style-name="Standard" style:list-style-name="LFO2" style:family="paragraph"/>
    <style:style style:name="P23" style:parent-style-name="Standard" style:list-style-name="LFO2" style:family="paragraph"/>
    <style:style style:name="T24" style:parent-style-name="Absatz-Standardschriftart" style:family="text">
      <style:text-properties fo:font-weight="bold" style:font-weight-asian="bold" style:font-weight-complex="bold"/>
    </style:style>
    <style:style style:name="P25" style:parent-style-name="Listenabsatz" style:list-style-name="LFO3" style:family="paragraph"/>
    <style:style style:name="T26" style:parent-style-name="Absatz-Standardschriftart" style:family="text">
      <style:text-properties fo:font-weight="bold" style:font-weight-asian="bold" style:font-weight-complex="bold"/>
    </style:style>
    <style:style style:name="P27" style:parent-style-name="Listenabsatz" style:list-style-name="LFO3" style:family="paragraph"/>
    <style:style style:name="T28" style:parent-style-name="Absatz-Standardschriftart" style:family="text">
      <style:text-properties fo:font-weight="bold" style:font-weight-asian="bold" style:font-weight-complex="bold"/>
    </style:style>
    <style:style style:name="P29" style:parent-style-name="Listenabsatz" style:list-style-name="LFO3" style:family="paragraph"/>
    <style:style style:name="T30" style:parent-style-name="Absatz-Standardschriftart" style:family="text">
      <style:text-properties fo:font-weight="bold" style:font-weight-asian="bold" style:font-weight-complex="bold"/>
    </style:style>
    <style:style style:name="P31" style:parent-style-name="Listenabsatz" style:list-style-name="LFO3" style:family="paragraph"/>
    <style:style style:name="T32" style:parent-style-name="Absatz-Standardschriftart" style:family="text">
      <style:text-properties fo:font-weight="bold" style:font-weight-asian="bold" style:font-weight-complex="bold"/>
    </style:style>
    <style:style style:name="T33" style:parent-style-name="Überschrift1Zchn" style:family="text">
      <style:text-properties style:font-name-asian="Aptos"/>
    </style:style>
    <style:style style:name="P34" style:parent-style-name="Standard" style:list-style-name="LFO4" style:family="paragraph"/>
    <style:style style:name="T35" style:parent-style-name="Absatz-Standardschriftart" style:family="text">
      <style:text-properties fo:font-weight="bold" style:font-weight-asian="bold" style:font-weight-complex="bold"/>
    </style:style>
    <style:style style:name="P36" style:parent-style-name="Standard" style:list-style-name="LFO4" style:family="paragraph"/>
    <style:style style:name="T37" style:parent-style-name="Absatz-Standardschriftart" style:family="text">
      <style:text-properties fo:font-weight="bold" style:font-weight-asian="bold" style:font-weight-complex="bold"/>
    </style:style>
    <style:style style:name="T38" style:parent-style-name="Absatz-Standardschriftart" style:family="text">
      <style:text-properties fo:font-style="italic" style:font-style-asian="italic" style:font-style-complex="italic"/>
    </style:style>
    <style:style style:name="P39" style:parent-style-name="Standard" style:list-style-name="LFO4" style:family="paragraph"/>
    <style:style style:name="T40" style:parent-style-name="Absatz-Standardschriftart" style:family="text">
      <style:text-properties fo:font-weight="bold" style:font-weight-asian="bold" style:font-weight-complex="bold"/>
    </style:style>
    <style:style style:name="P41" style:parent-style-name="Standard" style:list-style-name="LFO4" style:family="paragraph"/>
    <style:style style:name="T42" style:parent-style-name="Absatz-Standardschriftart" style:family="text">
      <style:text-properties fo:font-weight="bold" style:font-weight-asian="bold" style:font-weight-complex="bold"/>
    </style:style>
    <style:style style:name="T43" style:parent-style-name="Absatz-Standardschriftart" style:family="text">
      <style:text-properties fo:font-weight="bold" style:font-weight-asian="bold" style:font-weight-complex="bold"/>
    </style:style>
    <style:style style:name="T44" style:parent-style-name="Absatz-Standardschriftart" style:family="text">
      <style:text-properties fo:font-weight="bold" style:font-weight-asian="bold" style:font-weight-complex="bold"/>
    </style:style>
    <style:style style:name="T45" style:parent-style-name="Absatz-Standardschriftart" style:family="text">
      <style:text-properties fo:font-style="italic" style:font-style-asian="italic" style:font-style-complex="italic"/>
    </style:style>
    <style:style style:name="T46" style:parent-style-name="Absatz-Standardschriftart" style:family="text">
      <style:text-properties fo:font-style="italic" style:font-style-asian="italic" style:font-style-complex="italic"/>
    </style:style>
    <style:style style:name="T47" style:parent-style-name="Absatz-Standardschriftart" style:family="text">
      <style:text-properties fo:font-style="italic" style:font-style-asian="italic" style:font-style-complex="italic"/>
    </style:style>
    <style:style style:name="T48" style:parent-style-name="Absatz-Standardschriftart" style:family="text">
      <style:text-properties fo:font-weight="bold" style:font-weight-asian="bold" style:font-weight-complex="bold"/>
    </style:style>
    <style:style style:name="P49" style:parent-style-name="Standard" style:list-style-name="LFO5" style:family="paragraph"/>
    <style:style style:name="P50" style:parent-style-name="Standard" style:list-style-name="LFO5" style:family="paragraph"/>
    <style:style style:name="P51" style:parent-style-name="Standard" style:list-style-name="LFO5" style:family="paragraph"/>
    <style:style style:name="P52" style:parent-style-name="Standard" style:family="paragraph">
      <style:text-properties style:font-name="Segoe UI Emoji" style:font-name-complex="Segoe UI Emoji" fo:font-weight="bold" style:font-weight-asian="bold" style:font-weight-complex="bold"/>
    </style:style>
    <style:style style:name="P53" style:parent-style-name="Standard" style:family="paragraph">
      <style:text-properties style:font-name="Segoe UI Emoji" style:font-name-complex="Segoe UI Emoji" fo:font-weight="bold" style:font-weight-asian="bold" style:font-weight-complex="bold"/>
    </style:style>
    <style:style style:name="P54" style:parent-style-name="Standard" style:family="paragraph">
      <style:text-properties style:font-name="Segoe UI Emoji" style:font-name-complex="Segoe UI Emoji"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paragraph-properties fo:keep-with-next="always"/>
    </style:style>
    <style:style style:name="T57" style:parent-style-name="Absatz-Standardschriftart" style:family="text">
      <style:text-properties fo:font-weight="bold" style:font-weight-asian="bold" style:font-weight-complex="bold"/>
    </style:style>
    <style:style style:name="T58" style:parent-style-name="Absatz-Standardschriftart" style:family="text">
      <style:text-properties fo:font-size="11pt" style:font-size-asian="11pt" style:font-size-complex="11pt"/>
    </style:style>
    <style:style style:name="T59" style:parent-style-name="Absatz-Standardschriftart" style:family="text">
      <style:text-properties fo:font-weight="bold" style:font-weight-asian="bold" style:font-weight-complex="bold" fo:font-size="11pt" style:font-size-asian="11pt" style:font-size-complex="11pt"/>
    </style:style>
    <style:style style:name="P60" style:parent-style-name="Beschriftung" style:family="paragraph">
      <style:paragraph-properties fo:keep-with-next="always"/>
    </style:style>
    <style:style style:name="T61" style:parent-style-name="Absatz-Standardschriftart" style:family="text">
      <style:text-properties fo:font-weight="bold" style:font-weight-asian="bold" style:font-weight-complex="bold"/>
    </style:style>
    <style:style style:name="P62" style:parent-style-name="Beschriftung" style:family="paragraph">
      <style:text-properties fo:font-size="11pt" style:font-size-asian="11pt" style:font-size-complex="11pt"/>
    </style:style>
    <style:style style:name="P63" style:parent-style-name="Standard" style:family="paragraph">
      <style:paragraph-properties fo:keep-with-next="always"/>
    </style:style>
    <style:style style:name="T64" style:parent-style-name="Absatz-Standardschriftart" style:family="text">
      <style:text-properties fo:font-weight="bold" style:font-weight-asian="bold" style:font-weight-complex="bold"/>
    </style:style>
    <style:style style:name="P65" style:parent-style-name="Beschriftung" style:family="paragraph">
      <style:text-properties fo:font-size="11pt" style:font-size-asian="11pt" style:font-size-complex="11pt"/>
    </style:style>
    <style:style style:name="P66" style:parent-style-name="Standard" style:family="paragraph">
      <style:paragraph-properties fo:keep-with-next="always"/>
    </style:style>
    <style:style style:name="T67" style:parent-style-name="Absatz-Standardschriftart" style:family="text">
      <style:text-properties fo:font-weight="bold" style:font-weight-asian="bold" style:font-weight-complex="bold"/>
    </style:style>
    <style:style style:name="P68" style:parent-style-name="Beschriftung" style:family="paragraph">
      <style:text-properties fo:font-size="11pt" style:font-size-asian="11pt" style:font-size-complex="11pt"/>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paragraph-properties fo:break-before="page"/>
    </style:style>
    <style:style style:name="P74" style:parent-style-name="Standard" style:list-style-name="LFO6" style:family="paragraph"/>
    <style:style style:name="T75" style:parent-style-name="Absatz-Standardschriftart" style:family="text">
      <style:text-properties fo:font-weight="bold" style:font-weight-asian="bold" style:font-weight-complex="bold"/>
    </style:style>
    <style:style style:name="P76" style:parent-style-name="Standard" style:family="paragraph">
      <style:paragraph-properties fo:margin-left="0.5in">
        <style:tab-stops/>
      </style:paragraph-properties>
    </style:style>
    <style:style style:name="P77" style:parent-style-name="Standard" style:list-style-name="LFO6" style:family="paragraph"/>
    <style:style style:name="T78" style:parent-style-name="Absatz-Standardschriftart" style:family="text">
      <style:text-properties fo:font-weight="bold" style:font-weight-asian="bold" style:font-weight-complex="bold"/>
    </style:style>
    <style:style style:name="P79" style:parent-style-name="Standard" style:family="paragraph">
      <style:paragraph-properties fo:margin-left="0.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h text:style-name="P1" text:outline-level="1">Projektdokumentation: NYC Collision Analysis</text:h>
      <text:p text:style-name="P3"/>
      <text:p text:style-name="Standard"><text:span text:style-name="T4">Kurs:</text:span><text:s/>DataPy // Prof. Bießmann &amp; Prof. Ipek-Ugay<text:s/></text:p>
      <text:p text:style-name="P5"/>
      <text:p text:style-name="P6">Projektinformationen</text:p>
      <text:list text:style-name="LFO1" text:continue-numbering="true">
        <text:list-item>
          <text:p text:style-name="P7"><text:span text:style-name="T8">Name:<text:s/></text:span><text:s/>Justus Rothan</text:p>
        </text:list-item>
        <text:list-item>
          <text:p text:style-name="P9"><text:span text:style-name="T10">Matrikelnummer:</text:span><text:s/>106534</text:p>
        </text:list-item>
        <text:list-item>
          <text:p text:style-name="P11"><text:span text:style-name="T12">Projekttitel:</text:span><text:s/><text:span text:style-name="T13">NYC Collision Analysis: Streamlit Anwendung zur Analyse von Verkehrsunfällen</text:span><text:s/></text:p>
        </text:list-item>
        <text:list-item>
          <text:p text:style-name="P14"><text:span text:style-name="T15">Link zum Quellcode:<text:s/></text:span>https://github.com/TJ-codehub/DataPy</text:p>
        </text:list-item>
      </text:list>
      <text:p text:style-name="P16"/>
      <text:soft-page-break/>
      <text:h text:style-name="Überschrift1" text:outline-level="1">Kernidee und Datenquelle</text:h>
      <text:p text:style-name="Standard"><text:span text:style-name="T17">Grundidee und Forschungsfragen:</text:span><text:s/>Ziel meiner Analyse ist es vorherzusagen, zu welchem Zeitpunkt, sei es Tages- oder Jahreszeit, es am gefährlichsten ist in NYC unterwegs zu sein, basierend auf Unfallstatistiken.</text:p>
      <text:p text:style-name="Standard"><text:span text:style-name="T18">Datenquelle:<text:s/></text:span>Als Datenquelle habe ich den „Motor Vehicle Collisions – Crashes“ Datensatz von Data.gov verwendet, der Informationen zu allen von der New Yorker Polizeibehörde (NYPD) erfassten Verkehrsunfällen zwischen 2012 und 2026 enthält.</text:p>
      <text:p text:style-name="Standard">[https://catalog.data.gov/dataset/motor-vehicle-collisions-crashes]</text:p>
      <text:p text:style-name="Standard">Ich habe mich für diesen Datensatz entschieden, da man Unfallstatistiken gut analysieren und aus ihnen Schlussfolgerungen ziehen kann. Der Datensatz war auch sehr umfangreich, auch wenn viele Spalten oft leer waren, anhand der großen Menge an Zeilen (über 2 Millionen) konnte ich trotzdem viele nützliche Daten verwenden.</text:p>
      <text:h text:style-name="Überschrift1" text:outline-level="1">Datenbereinigung</text:h>
      <text:p text:style-name="Standard"><text:span text:style-name="T19">Probleme in den Rohdaten:</text:span><text:s/>Die unbearbeiteten Daten hatten einige Probleme, die die Verarbeitung erschwert haben:</text:p>
      <text:list text:style-name="LFO2" text:continue-numbering="true">
        <text:list-item>
          <text:p text:style-name="P20">Falsche Datentypen (z. B. Datums- und Uhrzeitspalten als reine Text-Objekte).</text:p>
        </text:list-item>
        <text:list-item>
          <text:p text:style-name="P21">Zahlreiche fehlende Werte (NaN / Null) in geografischen Angaben (Breiten-/Längengrade) und Stadtteilen.<text:s/></text:p>
        </text:list-item>
        <text:list-item>
          <text:p text:style-name="P22">Unpräzise oder nichtssagende Einträge wie 'UNSPECIFIED', 'UNKNOWN' oder leere Zeichenketten in den Spalten für Unfallursachen und Fahrzeugtypen.</text:p>
        </text:list-item>
        <text:list-item>
          <text:p text:style-name="P23">Doppelte Werte bei Fahrzeugtypen („TAXT“ vs. „Taxi“)</text:p>
        </text:list-item>
      </text:list>
      <text:p text:style-name="Standard"><text:span text:style-name="T24">Bereinigungsschritte:</text:span><text:s/></text:p>
      <text:list text:style-name="LFO3" text:continue-numbering="true">
        <text:list-item>
          <text:p text:style-name="P25"><text:span text:style-name="T26">Typkonvertierung:</text:span><text:s/>Die Spalte CRASH DATE wurde in ein echtes datetime64-Format transformiert. Textspalten wurden zur Performance-Optimierung explizit in den Pandas-Datentyp string überführt.</text:p>
        </text:list-item>
        <text:list-item>
          <text:p text:style-name="P27"><text:span text:style-name="T28">Neue Features:</text:span><text:s/>Um zeitliche Analysen zu ermöglichen, wurden neue Merkmale erstellt: CRASH HOUR (Uhrzeit als Stunde) und WEEKDAY (Wochentag als Text).</text:p>
        </text:list-item>
        <text:list-item>
          <text:p text:style-name="P29"><text:span text:style-name="T30">Filtern ungültiger Werte:</text:span><text:s/>Für geografische Visualisierungen wurden Zeilen ohne valide Koordinaten separiert. Bei der Analyse von Unfallursachen wurden Einträge wie 'UNSPECIFIED' dynamisch herausgefiltert, um Verfälschungen in den Diagrammen zu vermeiden.</text:p>
        </text:list-item>
        <text:list-item>
          <text:p text:style-name="P31"><text:span text:style-name="T32">Gereinigte Daten:</text:span><text:s/>Nach dem Bereinigen in Pandas blieben über 2,2 Millionen Unfallereignisse (NYC_Collisions_Clean.csv) erhalten, welche als stabile Basis für das Dashboard dienen.<text:s/></text:p>
        </text:list-item>
      </text:list>
      <text:soft-page-break/>
      <text:p text:style-name="Standard"><text:span text:style-name="T33">Datenvisualisierung</text:span></text:p>
      <text:p text:style-name="Standard">Ich habe verschiedene Diagramme verwendet, um die gesammelten Daten anschaulich darzustellen:<text:s/></text:p>
      <text:list text:style-name="LFO4" text:continue-numbering="true">
        <text:list-item>
          <text:p text:style-name="P34"><text:span text:style-name="T35">Barcharts:<text:s/></text:span>Darstellung der Top-20-Unfallursachen und der am häufigsten beteiligten Fahrzeugtypen (z. B. Sedans, SUVs).<text:s/></text:p>
        </text:list-item>
        <text:list-item>
          <text:p text:style-name="P36"><text:span text:style-name="T37">Gefahren-Matrix (Heatmap):</text:span><text:s/>Eine Kreuztabelle aus<text:s/><text:span text:style-name="T38">Wochentag vs. Uhrzeit</text:span>.<text:s/></text:p>
        </text:list-item>
        <text:list-item>
          <text:p text:style-name="P39"><text:span text:style-name="T40">Kombiniertes Trend-Diagramm:</text:span><text:s/>Ein Balkendiagramm der täglichen Unfälle kombiniert mit einer Trendlinie zur saisonalen Glättung im Jahresverlauf.<text:s/></text:p>
        </text:list-item>
        <text:list-item>
          <text:p text:style-name="P41"><text:span text:style-name="T42">Langzeittrend:</text:span><text:s/>Ein Diagramm zur monatlichen Unfallentwicklung über mehrere Jahre hinweg.<text:s/></text:p>
        </text:list-item>
      </text:list>
      <text:p text:style-name="Standard"><text:span text:style-name="T43">Besonders geeignete Visualisierungen &amp; Erkenntnisse:</text:span><text:s/>Ich finde die Wochentag-Uhrzeit-Heatmap ist am aussagekräftigsten. Sie zeigt sehr gut, dass die Unfallzahlen an Werktagen exakt mit den Rush-Hours (08:00 Uhr und 16:00–17:00 Uhr) übereinstimmen. Am Wochenende verlagert sich der Hotspot dann etwas in die Nacht.<text:s/></text:p>
      <text:h text:style-name="Überschrift1" text:outline-level="1">Streamlit-Anwendung</text:h>
      <text:p text:style-name="Standard"><text:span text:style-name="T44">Funktionalitäten &amp; Navigation:</text:span><text:s/>Die finale Anwendung ist als mehrseitiges Dashboard aufgebaut, welches über eine Sidebar navigiert wird. Sie teilt sich in die Hauptbereiche:<text:s/><text:span text:style-name="T45">Datenübersicht</text:span>,<text:s/><text:span text:style-name="T46">Data Visualization</text:span><text:s/>(Diagramme und Karte) und<text:s/><text:span text:style-name="T47">ML Prediction (nicht funktional!)</text:span><text:s/>auf.</text:p>
      <text:p text:style-name="Standard"><text:span text:style-name="T48">Interaktive Elemente &amp; Filterlogik:</text:span><text:s/>Der Fokus des Dashboards ist der Filterbereich auf der Visualisierungsseite. Nutzer können die Diagramme und Karten nach genauen Kriterien filtern:<text:s/></text:p>
      <text:list text:style-name="LFO5" text:continue-numbering="true">
        <text:list-item>
          <text:p text:style-name="P49">Zeitlich: Jahr, Monat, Wochentag und exakte Stunde.<text:s/></text:p>
        </text:list-item>
        <text:list-item>
          <text:p text:style-name="P50">Kontextuell: Stadtteil (Borough), Haupt-Unfallursache und Anzahl der beteiligten Fahrzeuge.<text:s/></text:p>
        </text:list-item>
        <text:list-item>
          <text:p text:style-name="P51">Schweregrad: Mindestanzahl an verletzten oder getöteten Personen via Slider.<text:s/></text:p>
        </text:list-item>
      </text:list>
      <text:p text:style-name="Standard">Um die Performance zu optimieren habe ich auch die Möglichkeit gegeben die für die Diagramme verwendeten Datenmengen einzuschränken, sodass auch bei vielen passenden Zeilen die Anwendung flüssig läuft.</text:p>
      <text:p text:style-name="P52"/>
      <text:p text:style-name="P53"/>
      <text:p text:style-name="P54"/>
      <text:soft-page-break/>
      <text:p text:style-name="P55">Screenshots der Anwendung</text:p>
      <text:p text:style-name="P56"><text:span text:style-name="T57"><draw:frame draw:style-name="a0" draw:name="Grafik 1" text:anchor-type="as-char" svg:x="0in" svg:y="0in" svg:width="6.29861in" svg:height="3.04375in" style:rel-width="scale" style:rel-height="scale"><draw:image xlink:href="media/image1.png" xlink:type="simple" xlink:show="embed" xlink:actuate="onLoad"/><svg:title/><svg:desc/></draw:frame></text:span></text:p>
      <text:p text:style-name="Beschriftung"><text:span text:style-name="T58">Datenübersicht mit den wichtigsten Merkmalen des Datensatzes.</text:span><text:span text:style-name="T59"><text:s/></text:span></text:p>
      <text:p text:style-name="Standard"/>
      <text:p text:style-name="P60"><text:span text:style-name="T61"><draw:frame draw:style-name="a1" draw:name="Grafik 2" text:anchor-type="as-char" svg:x="0in" svg:y="0in" svg:width="6.29861in" svg:height="3.04375in" style:rel-width="scale" style:rel-height="scale"><draw:image xlink:href="media/image2.png" xlink:type="simple" xlink:show="embed" xlink:actuate="onLoad"/><svg:title/><svg:desc/></draw:frame></text:span></text:p>
      <text:p text:style-name="P62">Visualisierung: Die Hauptunfallursachen.</text:p>
      <text:soft-page-break/>
      <text:p text:style-name="P63"><text:span text:style-name="T64"><draw:frame draw:style-name="a2" draw:name="Grafik 4" text:anchor-type="as-char" svg:x="0in" svg:y="0in" svg:width="6.29861in" svg:height="3.04375in" style:rel-width="scale" style:rel-height="scale"><draw:image xlink:href="media/image3.png" xlink:type="simple" xlink:show="embed" xlink:actuate="onLoad"/><svg:title/><svg:desc/></draw:frame></text:span></text:p>
      <text:p text:style-name="P65">Visualisierung: Wochentag vs. Uhrzeit Heatmap und Saisonale Unfalltrends.</text:p>
      <text:p text:style-name="Standard"/>
      <text:p text:style-name="P66"><text:span text:style-name="T67"><draw:frame draw:style-name="a3" draw:name="Grafik 3" text:anchor-type="as-char" svg:x="0in" svg:y="0in" svg:width="6.29861in" svg:height="3.04375in" style:rel-width="scale" style:rel-height="scale"><draw:image xlink:href="media/image4.png" xlink:type="simple" xlink:show="embed" xlink:actuate="onLoad"/><svg:title/><svg:desc/></draw:frame></text:span></text:p>
      <text:p text:style-name="P68">Visualisierung: Interaktive Karte von NYC mit geplotteten Unfällen.</text:p>
      <text:p text:style-name="P69"/>
      <text:p text:style-name="P70"/>
      <text:p text:style-name="P71"/>
      <text:p text:style-name="P72"/>
      <text:p text:style-name="P73"/>
      <text:h text:style-name="Überschrift1" text:outline-level="1">Reflexion<text:s/></text:h>
      <text:list text:style-name="LFO6" text:continue-numbering="true">
        <text:list-item>
          <text:p text:style-name="P74"><text:span text:style-name="T75">Was hat gut funktioniert?</text:span><text:s/>Das Visualisieren der Daten ist mit verschiedenen Diagramm-Typen gut gelungen. Besonders anschaulich finde ich die Interaktie Karte. Auch konnte ich das Filtern nach mehreren Ansätzen gut und einheitlich über die Anwendung integrieren.<text:s/></text:p>
        </text:list-item>
      </text:list>
      <text:p text:style-name="P76">Das Bauen der App hat dank KI relativ gut funktioniert. Nachdem ich die Möglichkeiten von Bibliotheken wie matplotlib/ plotly und streamlit erkannt hatte, konnte ich meine Anforderungen gut kommunizieren.</text:p>
      <text:list text:style-name="LFO6" text:continue-numbering="true">
        <text:list-item>
          <text:p text:style-name="P77"><text:span text:style-name="T78">Herausforderungen:</text:span><text:s/>Es gab viele falsch eingetragene Daten, wodurch ich auch nach meinem ersten Data-cleaning immer wieder zurückschauen und meine Pipeline anpassen musste, da sie mir erst bei der Verwendung der App aufgefallen sind.</text:p>
        </text:list-item>
      </text:list>
      <text:p text:style-name="P79">Auch sind einige Diagramme nicht so aussagekräftig wie ich es am Anfang vermutet hätte. Der Saisonale Verlauf bleibt bei vielen Daten überraschend flach, ich dachte die Jahreszeit hätte einen größeren Impact auf die Unfallmenge. Auch ist die Karte ziemlich Uniform. Ich dachte es gäbe mehr Unfälle an Hauptverkehrsknotenpunkten, auch wenn Hauptstraßen den Großteil ausmachen, sind Unfälle doch sehr gleichmäßig über die Stadt vertei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Zeilennummer" style:display-name="Zeilennummer"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than, Justus</meta:initial-creator>
    <dc:creator>Rothan, Justus</dc:creator>
    <meta:creation-date>2026-06-23T12:28:00Z</meta:creation-date>
    <dc:date>2026-06-23T14:25:00Z</dc:date>
    <meta:template xlink:href="Normal.dotm" xlink:type="simple"/>
    <meta:editing-cycles>10</meta:editing-cycles>
    <meta:editing-duration>PT0S</meta:editing-duration>
    <meta:document-statistic meta:page-count="6" meta:paragraph-count="11" meta:word-count="779" meta:character-count="5678" meta:row-count="40" meta:non-whitespace-character-count="4910"/>
  </office:meta>
</office:document-meta>
</file>